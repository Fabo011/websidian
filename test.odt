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  <text:h text:outline-level="1">Test ODT Heading</text:h>
      <text:p>First paragraph of the OpenDocument text file.</text:p>
      <text:p>Second paragraph for preview check.</text:p>
    </office:text>
  </office:body>
</office:document-content>
</file>